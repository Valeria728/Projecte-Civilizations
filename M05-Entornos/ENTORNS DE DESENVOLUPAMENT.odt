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07a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5 - ENTORNS DE DESENVOLUPAMENT</text:p>
      <text:p text:style-name="P1">Projecte Civilizations - Curs 2025-2026</text:p>
      <text:p text:style-name="P1">AMS / AWS</text:p>
      <text:p text:style-name="P1"/>
      <text:p text:style-name="P1"/>
      <text:p text:style-name="P1"/>
      <text:p text:style-name="P2">1. DIAGRAMA DE CLASSES</text:p>
      <text:p text:style-name="P1"/>
      <text:p text:style-name="P1"/>
      <text:p text:style-name="P2">1.1. Descripcio:</text:p>
      <text:p text:style-name="P2"/>
      <text:p text:style-name="P1">Diagrama de classes de les classes i interficies de l'aplicacio Civilizations,</text:p>
      <text:p text:style-name="P1">incloent atributs i metodes. No s'inclouen totes les classes diferents,</text:p>
      <text:p text:style-name="P1">les suficients per comprendre l'estructura de objectes de l'aplicacio i les</text:p>
      <text:p text:style-name="P1">seves relacions.</text:p>
      <text:p text:style-name="P1"/>
      <text:p text:style-name="P2">1.2. Eina utilitzada:</text:p>
      <text:p text:style-name="P1"/>
      <text:p text:style-name="P1">Draw.io (diagrams.net) - https://app.diagrams.net</text:p>
      <text:p text:style-name="P1"/>
      <text:p text:style-name="P2">1.3. Classes i interficies incloses:</text:p>
      <text:p text:style-name="P1"/>
      <text:p text:style-name="P1"/>
      <text:p text:style-name="P1">+-------------------------+</text:p>
      <text:p text:style-name="P1">| <text:s text:c="2"/>&lt;&lt;interface&gt;&gt; <text:s text:c="8"/>|</text:p>
      <text:p text:style-name="P1">| <text:s text:c="3"/>MilitaryUnit <text:s text:c="8"/>|</text:p>
      <text:p text:style-name="P1">+-------------------------+</text:p>
      <text:p text:style-name="P1">| + attack(): int <text:s text:c="8"/>|</text:p>
      <text:p text:style-name="P1">| + defense(): int <text:s text:c="7"/>|</text:p>
      <text:p text:style-name="P1">| + getArmor(): int <text:s text:c="6"/>|</text:p>
      <text:p text:style-name="P1">| + takeDamage(int): void |</text:p>
      <text:p text:style-name="P1">+-------------------------+</text:p>
      <text:p text:style-name="P1"><text:s text:c="9"/>/_ <text:s text:c="9"/>|</text:p>
      <text:p text:style-name="P1"><text:s text:c="4"/>+-----+-----+</text:p>
      <text:p text:style-name="P1"><text:s text:c="4"/>| <text:s text:c="4"/>| <text:s text:c="4"/>|</text:p>
      <text:p text:style-name="P1"><text:s text:c="4"/>| <text:s text:c="4"/>| <text:s text:c="4"/>|</text:p>
      <text:p text:style-name="P1">+---v----+ +---v----+ +---v----+</text:p>
      <text:p text:style-name="P1">|&lt;&lt;abs&gt;&gt; | |&lt;&lt;abs&gt;&gt; | |&lt;&lt;abs&gt;&gt; |</text:p>
      <text:p text:style-name="P1">|Attack <text:s/>| |Defense | |Special |</text:p>
      <text:p text:style-name="P1">|Unit <text:s text:c="3"/>| |Unit <text:s text:c="3"/>| |Unit <text:s text:c="3"/>|</text:p>
      <text:p text:style-name="P1">+--------+ +--------+ +--------+</text:p>
      <text:p text:style-name="P1">| - base | | - base | | - base |</text:p>
      <text:p text:style-name="P1">| <text:s/>Damage| | <text:s/>Damage| | <text:s/>Damage|</text:p>
      <text:p text:style-name="P1">| - armor| | - armor| | - armor|</text:p>
      <text:p text:style-name="P1">| - ini- | | - ini- | | - ini- |</text:p>
      <text:p text:style-name="P1">| tial <text:s text:c="2"/>| | tial <text:s text:c="2"/>| | tial <text:s text:c="2"/>|</text:p>
      <text:p text:style-name="P1">| Armor <text:s/>| | Armor <text:s/>| | Armor <text:s/>|</text:p>
      <text:p text:style-name="P1">| - chan-| | <text:s text:c="7"/>| | - chan-|</text:p>
      <text:p text:style-name="P1">| ceAtta-| | <text:s text:c="7"/>| | ceAtta-|</text:p>
      <text:p text:style-name="P1">| ckAgain| | <text:s text:c="7"/>| | ckAgain|</text:p>
      <text:p text:style-name="P1"><text:soft-page-break/>+--------+ +--------+ +--------+</text:p>
      <text:p text:style-name="P1">| + atta-| | + atta-| | + atta-|</text:p>
      <text:p text:style-name="P1">| ck(): <text:s/>| | ck(): <text:s/>| | ck(): <text:s/>|</text:p>
      <text:p text:style-name="P1">| int <text:s text:c="3"/>| | int <text:s text:c="3"/>| | int <text:s text:c="3"/>|</text:p>
      <text:p text:style-name="P1">| + defe-| | + defe-| | + defe-|</text:p>
      <text:p text:style-name="P1">| nse(): | | nse(): | | nse(): |</text:p>
      <text:p text:style-name="P1">| int <text:s text:c="3"/>| | int <text:s text:c="3"/>| | int <text:s text:c="3"/>|</text:p>
      <text:p text:style-name="P1">| + getAr| | + getAr| | + getAr|</text:p>
      <text:p text:style-name="P1">| mor(): | | mor(): | | mor(): |</text:p>
      <text:p text:style-name="P1">| int <text:s text:c="3"/>| | int <text:s text:c="3"/>| | int <text:s text:c="3"/>|</text:p>
      <text:p text:style-name="P1">| + takeD| | + takeD| | + takeD|</text:p>
      <text:p text:style-name="P1">| amage()| | amage()| | amage()|</text:p>
      <text:p text:style-name="P1">+--------+ +--------+ +--------+</text:p>
      <text:p text:style-name="P1"><text:s text:c="4"/>| <text:s text:c="9"/>| <text:s text:c="9"/>|</text:p>
      <text:p text:style-name="P1"><text:s text:c="4"/>| <text:s text:c="3"/>+-----+ <text:s text:c="9"/>|</text:p>
      <text:p text:style-name="P1"><text:s text:c="4"/>| <text:s text:c="3"/>| <text:s text:c="15"/>|</text:p>
      <text:p text:style-name="P1">+---v----+ +---v----+ +--v-----+</text:p>
      <text:p text:style-name="P1">|Swords- | |Spear- <text:s/>| |Cross- <text:s/>|</text:p>
      <text:p text:style-name="P1">|man <text:s text:c="4"/>| |man <text:s text:c="4"/>| |bow <text:s text:c="4"/>|</text:p>
      <text:p text:style-name="P1">+--------+ +--------+ +--------+</text:p>
      <text:p text:style-name="P1">| - armor| | - armor| | - armor|</text:p>
      <text:p text:style-name="P1">| : 400 <text:s/>| | : 600 <text:s/>| | : 1000 |</text:p>
      <text:p text:style-name="P1">| - atta-| | - atta-| | - atta-|</text:p>
      <text:p text:style-name="P1">| ck: 80 | | ck: 150| | ck: 700|</text:p>
      <text:p text:style-name="P1">| - defe-| | - defe-| | - defe-|</text:p>
      <text:p text:style-name="P1">| nse: 65| | nse: 70| | nse: 45|</text:p>
      <text:p text:style-name="P1">+--------+ +--------+ +--------+</text:p>
      <text:p text:style-name="P1"/>
      <text:p text:style-name="P1">+---v----+</text:p>
      <text:p text:style-name="P1">|Cannon <text:s/>|</text:p>
      <text:p text:style-name="P1">+--------+</text:p>
      <text:p text:style-name="P1">| - armor|</text:p>
      <text:p text:style-name="P1">| : 8000 |</text:p>
      <text:p text:style-name="P1">| - atta-|</text:p>
      <text:p text:style-name="P1">| ck: 100|</text:p>
      <text:p text:style-name="P1">| 0 <text:s text:c="5"/>|</text:p>
      <text:p text:style-name="P1">| - defe-|</text:p>
      <text:p text:style-name="P1">| nse: 5 |</text:p>
      <text:p text:style-name="P1">+--------+</text:p>
      <text:p text:style-name="P1"/>
      <text:p text:style-name="P1">+---v--------+ +---v--------+ +---v----------------+</text:p>
      <text:p text:style-name="P1">|ArrowTower <text:s/>| |Catapult <text:s text:c="3"/>| |RocketLauncher <text:s text:c="5"/>|</text:p>
      <text:p text:style-name="P1">+------------+ +------------+ +--------------------+</text:p>
      <text:p text:style-name="P1">| - armor: <text:s text:c="2"/>| | - armor: <text:s text:c="2"/>| | - armor: 7000 <text:s text:c="5"/>|</text:p>
      <text:p text:style-name="P1">| <text:s text:c="2"/>800 <text:s text:c="5"/>| | <text:s text:c="2"/>1500 <text:s text:c="4"/>| | - attack: 2000 <text:s text:c="4"/>|</text:p>
      <text:p text:style-name="P1">| - attack: <text:s/>| | - attack: <text:s/>| | - defense: 90 <text:s text:c="5"/>|</text:p>
      <text:p text:style-name="P1">| <text:s text:c="2"/>120 <text:s text:c="5"/>| | <text:s text:c="2"/>250 <text:s text:c="5"/>| +--------------------+</text:p>
      <text:p text:style-name="P1">| - defense: | | - defense: |</text:p>
      <text:p text:style-name="P1">| <text:s text:c="2"/>80 <text:s text:c="6"/>| | <text:s text:c="2"/>80 <text:s text:c="6"/>|</text:p>
      <text:p text:style-name="P1">+------------+ +------------+</text:p>
      <text:p text:style-name="P1"/>
      <text:p text:style-name="P1">+---v-----+ +---v-----+</text:p>
      <text:p text:style-name="P1">|Magician | |Priest <text:s text:c="2"/>|</text:p>
      <text:p text:style-name="P1"><text:soft-page-break/>+---------+ +---------+</text:p>
      <text:p text:style-name="P1">| - armor:| | - armor:|</text:p>
      <text:p text:style-name="P1">| <text:s text:c="2"/>100 <text:s text:c="2"/>| | <text:s text:c="2"/>100 <text:s text:c="2"/>|</text:p>
      <text:p text:style-name="P1">| - atta- | | <text:s text:c="8"/>|</text:p>
      <text:p text:style-name="P1">| ck: 3000| | <text:s text:c="8"/>|</text:p>
      <text:p text:style-name="P1">| - defe- | | <text:s text:c="8"/>|</text:p>
      <text:p text:style-name="P1">| nse: 0 <text:s/>| | <text:s text:c="8"/>|</text:p>
      <text:p text:style-name="P1">+---------+ +---------+</text:p>
      <text:p text:style-name="P1"/>
      <text:p text:style-name="P1">+-------------------------+</text:p>
      <text:p text:style-name="P1">| <text:s text:c="5"/>Civilization <text:s text:c="6"/>|</text:p>
      <text:p text:style-name="P1">+-------------------------+</text:p>
      <text:p text:style-name="P1">| - technologyDefense: int|</text:p>
      <text:p text:style-name="P1">| - technologyAttack: int |</text:p>
      <text:p text:style-name="P1">| - wood: int <text:s text:c="12"/>|</text:p>
      <text:p text:style-name="P1">| - iron: int <text:s text:c="12"/>|</text:p>
      <text:p text:style-name="P1">| - food: int <text:s text:c="12"/>|</text:p>
      <text:p text:style-name="P1">| - mana: int <text:s text:c="12"/>|</text:p>
      <text:p text:style-name="P1">| - battles: int <text:s text:c="9"/>|</text:p>
      <text:p text:style-name="P1">| - army: ArrayList <text:s text:c="6"/>|</text:p>
      <text:p text:style-name="P1">| <text:s text:c="2"/>&lt;MilitaryUnit&gt;[9] <text:s text:c="4"/>|</text:p>
      <text:p text:style-name="P1">| - magicTower: int <text:s text:c="6"/>|</text:p>
      <text:p text:style-name="P1">| - church: int <text:s text:c="10"/>|</text:p>
      <text:p text:style-name="P1">| - farm: int <text:s text:c="12"/>|</text:p>
      <text:p text:style-name="P1">| - smithy: int <text:s text:c="10"/>|</text:p>
      <text:p text:style-name="P1">| - carpentry: int <text:s text:c="7"/>|</text:p>
      <text:p text:style-name="P1">+-------------------------+</text:p>
      <text:p text:style-name="P1">| + newChurch(): void <text:s text:c="4"/>|</text:p>
      <text:p text:style-name="P1">| + newMagicTower(): void |</text:p>
      <text:p text:style-name="P1">| + newFarm(): void <text:s text:c="6"/>|</text:p>
      <text:p text:style-name="P1">| + newCarpentry(): void <text:s/>|</text:p>
      <text:p text:style-name="P1">| + newSmithy(): void <text:s text:c="4"/>|</text:p>
      <text:p text:style-name="P1">| + upgradeTechnology <text:s text:c="4"/>|</text:p>
      <text:p text:style-name="P1">| <text:s text:c="2"/>Defense(): void <text:s text:c="6"/>|</text:p>
      <text:p text:style-name="P1">| + upgradeTechnology <text:s text:c="4"/>|</text:p>
      <text:p text:style-name="P1">| <text:s text:c="2"/>Attack(): void <text:s text:c="7"/>|</text:p>
      <text:p text:style-name="P1">| + newSwordsman(int): <text:s text:c="3"/>|</text:p>
      <text:p text:style-name="P1">| <text:s text:c="2"/>void <text:s text:c="17"/>|</text:p>
      <text:p text:style-name="P1">| + newSpearman(int): <text:s text:c="4"/>|</text:p>
      <text:p text:style-name="P1">| <text:s text:c="2"/>void <text:s text:c="17"/>|</text:p>
      <text:p text:style-name="P1">| + newCrossbow(int): <text:s text:c="4"/>|</text:p>
      <text:p text:style-name="P1">| <text:s text:c="2"/>void <text:s text:c="17"/>|</text:p>
      <text:p text:style-name="P1">| + newCannon(int): void <text:s/>|</text:p>
      <text:p text:style-name="P1">| + newArrowTower(int): <text:s text:c="2"/>|</text:p>
      <text:p text:style-name="P1">| <text:s text:c="2"/>void <text:s text:c="17"/>|</text:p>
      <text:p text:style-name="P1">| + newCatapult(int): <text:s text:c="4"/>|</text:p>
      <text:p text:style-name="P1">| <text:s text:c="2"/>void <text:s text:c="17"/>|</text:p>
      <text:p text:style-name="P1">| + newRocketLauncher <text:s text:c="4"/>|</text:p>
      <text:p text:style-name="P1">| <text:s text:c="2"/>(int): void <text:s text:c="10"/>|</text:p>
      <text:p text:style-name="P1">| + newMagician(int): <text:s text:c="4"/>|</text:p>
      <text:p text:style-name="P1">| <text:s text:c="2"/>void <text:s text:c="17"/>|</text:p>
      <text:p text:style-name="P1">| + newPriest(int): void <text:s/>| <text:s/></text:p>
      <text:p text:style-name="P1">| + printStats(): void <text:s text:c="3"/>|</text:p>
      <text:p text:style-name="P1"><text:soft-page-break/>+-------------------------+</text:p>
      <text:p text:style-name="P1"/>
      <text:p text:style-name="P1">+-------------------------+</text:p>
      <text:p text:style-name="P1">| <text:s text:c="6"/>Battle <text:s text:c="11"/>|</text:p>
      <text:p text:style-name="P1">+-------------------------+</text:p>
      <text:p text:style-name="P1">| - armyCivilization: <text:s text:c="4"/>|</text:p>
      <text:p text:style-name="P1">| <text:s text:c="2"/>ArrayList[9] <text:s text:c="9"/>|</text:p>
      <text:p text:style-name="P1">| - armyEnemy: <text:s text:c="11"/>|</text:p>
      <text:p text:style-name="P1">| <text:s text:c="2"/>ArrayList[4] <text:s text:c="9"/>|</text:p>
      <text:p text:style-name="P1">| - initialArmies: <text:s text:c="7"/>|</text:p>
      <text:p text:style-name="P1">| <text:s text:c="2"/>int[][] <text:s text:c="14"/>|</text:p>
      <text:p text:style-name="P1">| - resourcesLooses: <text:s text:c="5"/>|</text:p>
      <text:p text:style-name="P1">| <text:s text:c="2"/>int[][] <text:s text:c="14"/>|</text:p>
      <text:p text:style-name="P1">| - battleReport: String <text:s/>|</text:p>
      <text:p text:style-name="P1">| - battleDevelopment: <text:s text:c="3"/>|</text:p>
      <text:p text:style-name="P1">| <text:s text:c="2"/>String <text:s text:c="15"/>|</text:p>
      <text:p text:style-name="P1">+-------------------------+</text:p>
      <text:p text:style-name="P1">| + startBattle(): void <text:s text:c="2"/>|</text:p>
      <text:p text:style-name="P1">| + initInitialArmies(): <text:s/>|</text:p>
      <text:p text:style-name="P1">| <text:s text:c="2"/>void <text:s text:c="17"/>|</text:p>
      <text:p text:style-name="P1">| + updateResources <text:s text:c="6"/>|</text:p>
      <text:p text:style-name="P1">| <text:s text:c="2"/>Looses(): void <text:s text:c="7"/>|</text:p>
      <text:p text:style-name="P1">| + fleetResourceCost <text:s text:c="4"/>|</text:p>
      <text:p text:style-name="P1">| <text:s text:c="2"/>(ArrayList): int[] <text:s text:c="3"/>|</text:p>
      <text:p text:style-name="P1">| + initialFleetNumber <text:s text:c="3"/>|</text:p>
      <text:p text:style-name="P1">| <text:s text:c="2"/>(ArrayList): int[] <text:s text:c="3"/>|</text:p>
      <text:p text:style-name="P1">| + remainderPercentage <text:s text:c="2"/>|</text:p>
      <text:p text:style-name="P1">| <text:s text:c="2"/>Fleet(ArrayList): int |</text:p>
      <text:p text:style-name="P1">| + getGroupDefender <text:s text:c="5"/>|</text:p>
      <text:p text:style-name="P1">| <text:s text:c="2"/>(ArrayList): int <text:s text:c="5"/>|</text:p>
      <text:p text:style-name="P1">| + getCivilizationGroup <text:s/>|</text:p>
      <text:p text:style-name="P1">| <text:s text:c="2"/>Attacker(): int <text:s text:c="6"/>|</text:p>
      <text:p text:style-name="P1">| + getEnemyGroup <text:s text:c="8"/>|</text:p>
      <text:p text:style-name="P1">| <text:s text:c="2"/>Attacker(): int <text:s text:c="6"/>|</text:p>
      <text:p text:style-name="P1">| + resetArmyArmor(): void|</text:p>
      <text:p text:style-name="P1">| + getBattleReport(int): |</text:p>
      <text:p text:style-name="P1">| <text:s text:c="2"/>String <text:s text:c="15"/>|</text:p>
      <text:p text:style-name="P1">| + getBattleDevelopment <text:s/>|</text:p>
      <text:p text:style-name="P1">| <text:s text:c="2"/>(): String <text:s text:c="11"/>|</text:p>
      <text:p text:style-name="P1">+-------------------------+</text:p>
      <text:p text:style-name="P1"/>
      <text:p text:style-name="P1">+-------------------------+</text:p>
      <text:p text:style-name="P1">| <text:s/>ResourceException <text:s text:c="5"/>|</text:p>
      <text:p text:style-name="P1">| <text:s/>extends Exception <text:s text:c="5"/>|</text:p>
      <text:p text:style-name="P1">+-------------------------+</text:p>
      <text:p text:style-name="P1">| + ResourceException <text:s text:c="4"/>|</text:p>
      <text:p text:style-name="P1">| <text:s text:c="2"/>(String) <text:s text:c="13"/>|</text:p>
      <text:p text:style-name="P1">| + getMessage(): String <text:s/>|</text:p>
      <text:p text:style-name="P1">+-------------------------+</text:p>
      <text:p text:style-name="P1"/>
      <text:p text:style-name="P1"/>
      <text:p text:style-name="P1">+-------------------------+</text:p>
      <text:p text:style-name="P1">| <text:s/>BuildingException <text:s text:c="5"/>|</text:p>
      <text:p text:style-name="P1"><text:soft-page-break/>| <text:s/>extends Exception <text:s text:c="5"/>|</text:p>
      <text:p text:style-name="P1">+-------------------------+</text:p>
      <text:p text:style-name="P1">| + BuildingException <text:s text:c="4"/>|</text:p>
      <text:p text:style-name="P1">| <text:s text:c="2"/>(String) <text:s text:c="13"/>|</text:p>
      <text:p text:style-name="P1">| + getMessage(): String <text:s/>|</text:p>
      <text:p text:style-name="P1">+-------------------------+</text:p>
      <text:p text:style-name="P1"/>
      <text:p text:style-name="P1">+-------------------------+</text:p>
      <text:p text:style-name="P1">| <text:s/>&lt;&lt;interface&gt;&gt; <text:s text:c="9"/>|</text:p>
      <text:p text:style-name="P1">| <text:s text:c="3"/>Variables <text:s text:c="11"/>|</text:p>
      <text:p text:style-name="P1">+-------------------------+</text:p>
      <text:p text:style-name="P1">| + CHANCE_ATTACK_ <text:s text:c="7"/>|</text:p>
      <text:p text:style-name="P1">| <text:s text:c="2"/>CIVILIZATION_UNITS: <text:s text:c="2"/>|</text:p>
      <text:p text:style-name="P1">| <text:s text:c="2"/>int[] <text:s text:c="16"/>|</text:p>
      <text:p text:style-name="P1">| + CHANCE_ATTACK_ <text:s text:c="7"/>|</text:p>
      <text:p text:style-name="P1">| <text:s text:c="2"/>ENEMY_UNITS: int[] <text:s text:c="3"/>|</text:p>
      <text:p text:style-name="P1">| + CHANCE_GENERATING_ <text:s text:c="3"/>|</text:p>
      <text:p text:style-name="P1">| <text:s text:c="2"/>WASTE_SWORDSMAN: int <text:s/>|</text:p>
      <text:p text:style-name="P1">| + PERCENTAGE_WASTE: <text:s text:c="4"/>|</text:p>
      <text:p text:style-name="P1">| <text:s text:c="2"/>int <text:s text:c="18"/>|</text:p>
      <text:p text:style-name="P1">| + PLUS_ARMOR_UNIT_ <text:s text:c="5"/>|</text:p>
      <text:p text:style-name="P1">| <text:s text:c="2"/>SANCTIFIED: int <text:s text:c="6"/>|</text:p>
      <text:p text:style-name="P1">| + PLUS_ATTACK_UNIT_ <text:s text:c="4"/>|</text:p>
      <text:p text:style-name="P1">| <text:s text:c="2"/>SANCTIFIED: int <text:s text:c="6"/>|</text:p>
      <text:p text:style-name="P1">+-------------------------+</text:p>
      <text:p text:style-name="P1"/>
      <text:p text:style-name="P1"><text:span text:style-name="T1">1.4. Relacions:</text:span></text:p>
      <text:p text:style-name="P1"/>
      <text:p text:style-name="P1">MilitaryUnit <text:s/>&lt;&lt;implementa&gt;&gt; <text:s/>AttackUnit</text:p>
      <text:p text:style-name="P1">MilitaryUnit <text:s/>&lt;&lt;implementa&gt;&gt; <text:s/>DefenseUnit</text:p>
      <text:p text:style-name="P1">MilitaryUnit <text:s/>&lt;&lt;implementa&gt;&gt; <text:s/>SpecialUnit</text:p>
      <text:p text:style-name="P1"/>
      <text:p text:style-name="P1">AttackUnit <text:s text:c="3"/>&lt;&lt;exten&gt;&gt; <text:s/>Swordsman</text:p>
      <text:p text:style-name="P1">AttackUnit <text:s text:c="3"/>&lt;&lt;exten&gt;&gt; <text:s/>Spearman</text:p>
      <text:p text:style-name="P1">AttackUnit <text:s text:c="3"/>&lt;&lt;exten&gt;&gt; <text:s/>Crossbow</text:p>
      <text:p text:style-name="P1">AttackUnit <text:s text:c="3"/>&lt;&lt;exten&gt;&gt; <text:s/>Cannon</text:p>
      <text:p text:style-name="P1"/>
      <text:p text:style-name="P1">DefenseUnit <text:s text:c="2"/>&lt;&lt;exten&gt;&gt; <text:s/>ArrowTower</text:p>
      <text:p text:style-name="P1">DefenseUnit <text:s text:c="2"/>&lt;&lt;exten&gt;&gt; <text:s/>Catapult</text:p>
      <text:p text:style-name="P1">DefenseUnit <text:s text:c="2"/>&lt;&lt;exten&gt;&gt; <text:s/>RocketLauncherTower</text:p>
      <text:p text:style-name="P1"/>
      <text:p text:style-name="P1">SpecialUnit <text:s text:c="2"/>&lt;&lt;exten&gt;&gt; <text:s/>Magician</text:p>
      <text:p text:style-name="P1">SpecialUnit <text:s text:c="2"/>&lt;&lt;exten&gt;&gt; <text:s/>Priest</text:p>
      <text:p text:style-name="P1"/>
      <text:p text:style-name="P1">Civilization <text:s/>&lt;&lt;composicio&gt;&gt; <text:s/>MilitaryUnit[9]</text:p>
      <text:p text:style-name="P1"/>
      <text:p text:style-name="P1">Battle <text:s text:c="7"/>&lt;&lt;associa&gt;&gt; <text:s/>Civilization</text:p>
      <text:p text:style-name="P1">Battle <text:s text:c="7"/>&lt;&lt;associa&gt;&gt; <text:s/>MilitaryUnit</text:p>
      <text:p text:style-name="P1"/>
      <text:p text:style-name="P1">Civilization <text:s/>&lt;&lt;llanca&gt;&gt; <text:s/>ResourceException</text:p>
      <text:p text:style-name="P1">Civilization <text:s/>&lt;&lt;llanca&gt;&gt; <text:s/>BuildingException</text:p>
      <text:p text:style-name="P1"/>
      <text:p text:style-name="P1">Variables <text:s text:c="4"/>&lt;&lt;implementa&gt;&gt; <text:s/>(totes les unitats)</text:p>
      <text:p text:style-name="P1"><text:soft-page-break/></text:p>
      <text:p text:style-name="P1"/>
      <text:p text:style-name="P2">1.5. Ubicacio dels arxius:</text:p>
      <text:p text:style-name="P2"/>
      <text:p text:style-name="P1">- Editable:M05-EntornsDesenvolupament/docs/diagrama_classes.drawio</text:p>
      <text:p text:style-name="P1">- Imatge: <text:s/>M05-EntornsDesenvolupament/docs/diagrama_classes.png</text:p>
      <text:p text:style-name="P1"/>
      <text:p text:style-name="P1"/>
      <text:p text:style-name="P2">2. CONTROL DE VERSIONS:</text:p>
      <text:p text:style-name="P1"/>
      <text:p text:style-name="P1"/>
      <text:p text:style-name="P2">2.1. Plataforma;</text:p>
      <text:p text:style-name="P2"/>
      <text:p text:style-name="P1">GitHub</text:p>
      <text:p text:style-name="P1"/>
      <text:p text:style-name="P2">2.2. Requisits complerts:</text:p>
      <text:p text:style-name="P1"/>
      <text:p text:style-name="P1"/>
      <text:p text:style-name="P1">Requisit <text:s text:c="35"/>| Estat</text:p>
      <text:p text:style-name="P1">--------------------------------------------|-------</text:p>
      <text:p text:style-name="P1">Utilitzar GitHub <text:s text:c="27"/>| <text:s/>Si</text:p>
      <text:p text:style-name="P1">Cada commit amb missatge referent al canvi <text:s/>| <text:s/>Si</text:p>
      <text:p text:style-name="P1">Carpeta per cada modul M1, M2, M3, M4, M5 <text:s text:c="2"/>| <text:s/>Si</text:p>
      <text:p text:style-name="P1">README.md amb explicacio i instruccions <text:s text:c="4"/>| <text:s/>Si</text:p>
      <text:p text:style-name="P1">Branca de treball per alumne <text:s text:c="15"/>| <text:s/>Si</text:p>
      <text:p text:style-name="P1">Branca principal anomenada "main" <text:s text:c="10"/>| <text:s/>Si</text:p>
      <text:p text:style-name="P1">Merge a branca "preproduccio" <text:s text:c="14"/>| <text:s/>Si</text:p>
      <text:p text:style-name="P1">Entrega final en format release a GitHub <text:s text:c="3"/>| <text:s/>Si</text:p>
      <text:p text:style-name="P1">URL de release pujada a Moodle M5 <text:s text:c="10"/>| <text:s/>Si</text:p>
      <text:p text:style-name="P1"/>
      <text:p text:style-name="P1"><text:span text:style-name="T1">2.3. Estructura de branques:</text:span></text:p>
      <text:p text:style-name="P1"/>
      <text:p text:style-name="P1">main <text:s/>(branca principal)</text:p>
      <text:p text:style-name="P1"><text:s text:c="2"/>|</text:p>
      <text:p text:style-name="P1"><text:s text:c="2"/>|</text:p>
      <text:p text:style-name="P1"><text:s text:c="2"/>+-- alumneA <text:s/>(branca treball <text:span text:style-name="T2">Valeria</text:span>)</text:p>
      <text:p text:style-name="P1"><text:s text:c="2"/>+-- alumneB <text:s/>(branca treball <text:span text:style-name="T2">Diego</text:span>)</text:p>
      <text:p text:style-name="P1"><text:s text:c="2"/>+-- alumneC <text:s/>(branca treball <text:span text:style-name="T2">Miguel</text:span>)</text:p>
      <text:p text:style-name="P1"/>
      <text:p text:style-name="P2">2.4. Especificacions no funcionals:</text:p>
      <text:p text:style-name="P2"/>
      <text:p text:style-name="P1">- En la branca "preproduccio" es fa el merge dels canvis de cada membre.</text:p>
      <text:p text:style-name="P1">- L'entrega final es fa en format de release a GitHub.</text:p>
      <text:p text:style-name="P1">- La URL de la release es puja a la tasca de Moodle de M5.</text:p>
      <text:p text:style-name="P2"/>
      <text:p text:style-name="P2">2.5. URL del repositori</text:p>
      <text:p text:style-name="P1"/>
      <text:p text:style-name="P1">https://github.com/<text:span text:style-name="T2">Valeria</text:span>/Civilizations_Project</text:p>
      <text:p text:style-name="P1"/>
      <text:p text:style-name="P2"/>
      <text:p text:style-name="P2"/>
      <text:p text:style-name="P2"/>
      <text:p text:style-name="P2"><text:soft-page-break/>2.6. Release</text:p>
      <text:p text:style-name="P1"/>
      <text:p text:style-name="P1">- URL: <text:s text:c="7"/>https://github.com/<text:span text:style-name="T2">Valeria</text:span>/Civilizations_Project/releases</text:p>
      <text:p text:style-name="P1"/>
      <text:p text:style-name="P1"/>
      <text:p text:style-name="P2">3. PLANIFICACIO:</text:p>
      <text:p text:style-name="P1"/>
      <text:p text:style-name="P1"/>
      <text:p text:style-name="P2">3.1. Tasques amb estimacio de temps</text:p>
      <text:p text:style-name="P1"/>
      <text:p text:style-name="P3">Modul | Tasca <text:s text:c="35"/>| Responsable | T.Estimat | T. Real</text:p>
      <text:p text:style-name="P3">------|------------------------------------------|-------------|-----------|--------</text:p>
      <text:p text:style-name="P3">M05 <text:s text:c="2"/>| Crear repositori i branques a GitHub <text:s text:c="4"/>| Alumne A <text:s text:c="3"/>| <text:s text:c="4"/>1h <text:s text:c="3"/>|</text:p>
      <text:p text:style-name="P3">M05 <text:s text:c="2"/>| Crear diagrama de classes <text:s text:c="15"/>| Alumne C <text:s text:c="3"/>| <text:s text:c="4"/>3h <text:s text:c="3"/>|</text:p>
      <text:p text:style-name="P3">M01 <text:s text:c="2"/>| Fer un usuari per cada membre del grup <text:s text:c="2"/>| Alumne A <text:s text:c="3"/>| <text:s text:c="4"/>1h <text:s text:c="3"/>|</text:p>
      <text:p text:style-name="P3">M01 <text:s text:c="2"/>| Realitzar documentacio manual d'usuari <text:s text:c="2"/>| Alumne B <text:s text:c="3"/>| <text:s text:c="4"/>4h <text:s text:c="3"/>|</text:p>
      <text:p text:style-name="P3">M02 <text:s text:c="2"/>| Instal-lar i configurar la DDBB MySQL <text:s text:c="3"/>| Alumne B <text:s text:c="3"/>| <text:s text:c="4"/>2h <text:s text:c="3"/>|</text:p>
      <text:p text:style-name="P3">M02 <text:s text:c="2"/>| Crear els scripts de la DDBB i executar <text:s/>| Alumne B <text:s text:c="3"/>| <text:s text:c="4"/>3h <text:s text:c="3"/>|</text:p>
      <text:p text:style-name="P3">M03 <text:s text:c="2"/>| Programar classe Main <text:s text:c="19"/>| Alumne C <text:s text:c="3"/>| <text:s text:c="4"/>3h <text:s text:c="3"/>|</text:p>
      <text:p text:style-name="P3">M03 <text:s text:c="2"/>| Programar classe Battle <text:s text:c="17"/>| Alumne C <text:s text:c="3"/>| <text:s text:c="4"/>6h <text:s text:c="3"/>|</text:p>
      <text:p text:style-name="P3">M03 <text:s text:c="2"/>| Programar interficie Variables <text:s text:c="10"/>| Alumne C <text:s text:c="3"/>| <text:s text:c="4"/>1h <text:s text:c="3"/>|</text:p>
      <text:p text:style-name="P3">M03 <text:s text:c="2"/>| Programar interficies <text:s text:c="19"/>| Alumne C <text:s text:c="3"/>| <text:s text:c="4"/>1h <text:s text:c="3"/>|</text:p>
      <text:p text:style-name="P3">M03 <text:s text:c="2"/>| Programar classes "unit" <text:s text:c="16"/>| Alumne A <text:s text:c="3"/>| <text:s text:c="4"/>6h <text:s text:c="3"/>|</text:p>
      <text:p text:style-name="P3">M01 <text:s text:c="2"/>| Programar elements grafics <text:s text:c="14"/>| Alumne A <text:s text:c="3"/>| <text:s text:c="4"/>8h <text:s text:c="3"/>|</text:p>
      <text:p text:style-name="P3">M04 <text:s text:c="2"/>| Pagines dinamiques <text:s text:c="22"/>| Alumne B <text:s text:c="3"/>| <text:s text:c="4"/>8h <text:s text:c="3"/>|</text:p>
      <text:p text:style-name="P3">M02/4 | Consultes base de dades <text:s text:c="17"/>| Alumne B <text:s text:c="3"/>| <text:s text:c="4"/>4h <text:s text:c="3"/>|</text:p>
      <text:p text:style-name="P3">M05 <text:s text:c="2"/>| Crear el README.md a GitHub <text:s text:c="13"/>| Alumne B <text:s text:c="3"/>| <text:s text:c="4"/>1h <text:s text:c="3"/>|</text:p>
      <text:p text:style-name="P3">M05 <text:s text:c="2"/>| Crear la release a GitHub <text:s text:c="15"/>| Alumne C <text:s text:c="3"/>| <text:s text:c="4"/>1h <text:s text:c="3"/>|</text:p>
      <text:p text:style-name="P3">Tots <text:s/>| Fer i entrenar la presentacio <text:s text:c="11"/>| Tots <text:s text:c="7"/>| <text:s text:c="4"/>3h <text:s text:c="3"/>|</text:p>
      <text:p text:style-name="P3">------|------------------------------------------|-------------|-----------|----</text:p>
      <text:p text:style-name="P3"><text:s text:c="6"/>| TOTAL <text:s text:c="35"/>| <text:s text:c="12"/>| <text:s text:c="3"/>59h <text:s text:c="3"/>|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9T15:54:35.161632829</meta:creation-date>
    <dc:date>2026-05-09T17:55:35.713996781</dc:date>
    <meta:editing-duration>PT1H8M52S</meta:editing-duration>
    <meta:editing-cycles>1</meta:editing-cycles>
    <meta:document-statistic meta:table-count="0" meta:image-count="0" meta:object-count="0" meta:page-count="7" meta:paragraph-count="289" meta:word-count="1500" meta:character-count="9712" meta:non-whitespace-character-count="6759"/>
    <meta:generator>LibreOffice/25.8.6.2$Linux_X86_64 LibreOffice_project/a46b460d1686bb49c718d2ef5f88b83ff2dc4981</meta:generator>
  </office:meta>
</office:document-meta>
</file>