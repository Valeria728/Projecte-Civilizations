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80000057A92E92E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5.4556in" table:align="left"/>
    </style:style>
    <style:style style:name="Tabla1.A" style:family="table-column">
      <style:table-column-properties style:column-width="0.6097in"/>
    </style:style>
    <style:style style:name="Tabla1.B" style:family="table-column">
      <style:table-column-properties style:column-width="3.3in"/>
    </style:style>
    <style:style style:name="Tabla1.C" style:family="table-column">
      <style:table-column-properties style:column-width="0.8951in"/>
    </style:style>
    <style:style style:name="Tabla1.D" style:family="table-column">
      <style:table-column-properties style:column-width="0.6507in"/>
    </style:style>
    <style:style style:name="Tabla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Heading_20_2">
      <style:text-properties style:font-name="Google Sans"/>
    </style:style>
    <style:style style:name="P3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tyle="italic" officeooo:rsid="0015d27d" officeooo:paragraph-rsid="0015d27d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rial" fo:font-weight="bold" style:font-weight-asian="bold" style:font-weight-complex="bold"/>
    </style:style>
    <style:style style:name="P8" style:family="paragraph" style:parent-style-name="Text_20_body" style:list-style-name="L1">
      <style:paragraph-properties fo:line-height="114%"/>
      <style:text-properties style:font-name="Google Sans"/>
    </style:style>
    <style:style style:name="P9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Courier new"/>
    </style:style>
    <style:style style:name="P10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1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12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3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Courier new"/>
    </style:style>
    <style:style style:name="P1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Courier new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T1" style:family="text">
      <style:text-properties style:font-name="Arial" fo:font-weight="bold"/>
    </style:style>
    <style:style style:name="T2" style:family="text">
      <style:text-properties style:font-name="Arial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/>
    </style:style>
    <style:style style:name="T5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5 - ENTORNS DE DESENVOLUPAMENT</text:p>
      <text:p text:style-name="P1">Projecte Civilizations - Curs 2025-2026</text:p>
      <text:p text:style-name="P1">AMS / AWS</text:p>
      <text:p text:style-name="P1"/>
      <text:h text:style-name="P2" text:outline-level="2">1. DIAGRAMA DE CLASSES</text:h>
      <text:h text:style-name="P3" text:outline-level="3">1.1. Descripció</text:h>
      <text:p text:style-name="P4">Diagrama de classes de les classes i interfícies de l'aplicació Civilizations, incloent atributs i mètodes principals. S’ha representat l’estructura jeràrquica d’unitats militars, la gestió de recursos i la lògica de batalla.</text:p>
      <text:h text:style-name="P3" text:outline-level="3"><text:soft-page-break/>1.2. Representació Gràfica</text:h>
      <text:p text:style-name="P5"><draw:frame draw:style-name="fr1" draw:name="Imagen1" text:anchor-type="char" svg:width="6.6929in" svg:height="9.0882in" draw:z-index="0"><draw:image xlink:href="Pictures/10000001000003880000057A92E92EE8.png" xlink:type="simple" xlink:show="embed" xlink:actuate="onLoad" draw:mime-type="image/png"/></draw:frame>­</text:p>
      <text:p text:style-name="P6"/>
      <text:p text:style-name="P7"><text:soft-page-break/>diagrama muestra:</text:p>
      <text:list text:style-name="L1">
        <text:list-item>
          <text:p text:style-name="P8"><text:span text:style-name="T1">La Jerarquía de Herencia:</text:span><text:span text:style-name="T2"> Cómo las unidades específicas (como el </text:span><text:span text:style-name="Source_20_Text"><text:span text:style-name="T2">Swordsman</text:span></text:span><text:span text:style-name="T2">) heredan de clases generales (</text:span><text:span text:style-name="Source_20_Text"><text:span text:style-name="T2">AttackUnit</text:span></text:span><text:span text:style-name="T2">).</text:span></text:p>
        </text:list-item>
        <text:list-item>
          <text:p text:style-name="P8"><text:span text:style-name="T1">La Implementación de Interfaces:</text:span><text:span text:style-name="T2"> Cómo todas las unidades se obligan a seguir las reglas de </text:span><text:span text:style-name="Source_20_Text"><text:span text:style-name="T2">MilitaryUnit</text:span></text:span><text:span text:style-name="T2">.</text:span></text:p>
        </text:list-item>
        <text:list-item>
          <text:p text:style-name="P8"><text:span text:style-name="T1">La Composición:</text:span><text:span text:style-name="T2"> Cómo la clase </text:span><text:span text:style-name="Source_20_Text"><text:span text:style-name="T2">Civilization</text:span></text:span><text:span text:style-name="T2"> agrupa y gestiona todas las demás piezas (recursos y ejército).</text:span></text:p>
        </text:list-item>
        <text:list-item>
          <text:p text:style-name="P8"><text:span text:style-name="T1">El Manejo de Errores:</text:span><text:span text:style-name="T2"> La relación con las clases de </text:span><text:span text:style-name="T1">Excepciones</text:span><text:span text:style-name="T2"> (</text:span><text:span text:style-name="Source_20_Text"><text:span text:style-name="T2">ResourceException</text:span></text:span><text:span text:style-name="T2">), que es un requisito clave del PDF.</text:span></text:p>
          <text:p text:style-name="P8"/>
        </text:list-item>
      </text:list>
      <text:h text:style-name="P3" text:outline-level="3">1.3. Elements Clau del Disseny</text:h>
      <text:list text:style-name="L2">
        <text:list-item>
          <text:p text:style-name="P9"><text:span text:style-name="T3">Interfície </text:span><text:span text:style-name="Source_20_Text"><text:span text:style-name="T3">MilitaryUnit</text:span></text:span><text:span text:style-name="T3">:</text:span><text:span text:style-name="T4"> Defineix el contracte per a totes les unitats (atac, defensa, cost).</text:span></text:p>
        </text:list-item>
        <text:list-item>
          <text:p text:style-name="P9"><text:span text:style-name="T3">Classes Abstractes:</text:span><text:span text:style-name="T4"> </text:span><text:span text:style-name="Source_20_Text"><text:span text:style-name="T4">AttackUnit</text:span></text:span><text:span text:style-name="T4">, </text:span><text:span text:style-name="Source_20_Text"><text:span text:style-name="T4">DefenseUnit</text:span></text:span><text:span text:style-name="T4"> i </text:span><text:span text:style-name="Source_20_Text"><text:span text:style-name="T4">SpecialUnit</text:span></text:span><text:span text:style-name="T4"> actuen com a base per evitar duplicitat de codi.</text:span></text:p>
        </text:list-item>
        <text:list-item>
          <text:p text:style-name="P10"><text:span text:style-name="T5">Civilization:</text:span> Gestiona l'inventari de recursos (fusta, ferro, menjar, manà) i el llistat d'unitats.</text:p>
        </text:list-item>
        <text:list-item>
          <text:p text:style-name="P9"><text:span text:style-name="T3">Excepcions:</text:span><text:span text:style-name="T4"> S'inclouen </text:span><text:span text:style-name="Source_20_Text"><text:span text:style-name="T4">ResourceException</text:span></text:span><text:span text:style-name="T4"> i </text:span><text:span text:style-name="Source_20_Text"><text:span text:style-name="T4">BuildingException</text:span></text:span><text:span text:style-name="T4"> per controlar errors de joc.</text:span></text:p>
        </text:list-item>
      </text:list>
      <text:h text:style-name="P11" text:outline-level="2">2. CONTROL DE VERSIONS</text:h>
      <text:h text:style-name="P3" text:outline-level="3">2.1. Estratègia de branques</text:h>
      <text:p text:style-name="P4">S'ha seguit el següent model de treball a GitHub:</text:p>
      <text:list text:style-name="L3">
        <text:list-item>
          <text:p text:style-name="P12"><text:span text:style-name="T5">main:</text:span> Branca principal amb el codi estable.</text:p>
        </text:list-item>
        <text:list-item>
          <text:p text:style-name="P12"><text:span text:style-name="T5">pre-production:</text:span> Branca d'integració on s'uneixen els canvis dels membres de l'equip.</text:p>
        </text:list-item>
        <text:list-item>
          <text:p text:style-name="P12"><text:span text:style-name="T5">[nom-alumne]:</text:span> Branques de treball individual per a cada mòdul.</text:p>
        </text:list-item>
      </text:list>
      <text:h text:style-name="P3" text:outline-level="3">2.2. Estructura del Projecte</text:h>
      <text:p text:style-name="P4">El repositori està organitzat en carpetes per mòduls segons la normativa:</text:p>
      <text:list text:style-name="L4">
        <text:list-item>
          <text:p text:style-name="P13"><text:span text:style-name="Source_20_Text"><text:span text:style-name="T4">/M01</text:span></text:span><text:span text:style-name="T4">: Documentació i manuals.</text:span></text:p>
        </text:list-item>
        <text:list-item>
          <text:p text:style-name="P13"><text:span text:style-name="Source_20_Text"><text:span text:style-name="T4">/M02</text:span></text:span><text:span text:style-name="T4">: Scripts de la base de dades (Oracle SQL).</text:span></text:p>
        </text:list-item>
        <text:list-item>
          <text:p text:style-name="P13"><text:span text:style-name="Source_20_Text"><text:span text:style-name="T4">/M03</text:span></text:span><text:span text:style-name="T4">: Codi font Java.</text:span></text:p>
        </text:list-item>
        <text:list-item>
          <text:p text:style-name="P13"><text:soft-page-break/><text:span text:style-name="Source_20_Text"><text:span text:style-name="T4">/M05</text:span></text:span><text:span text:style-name="T4">: Documentació técnica i diagrames.</text:span></text:p>
        </text:list-item>
      </text:list>
      <text:h text:style-name="P3" text:outline-level="3">2.3. URL del Repositori</text:h>
      <text:p text:style-name="P14"><text:span text:style-name="Source_20_Text"><text:span text:style-name="T4">https://github.com/Valeria728/Projecte-Civilizations.git</text:span></text:span></text:p>
      <text:h text:style-name="P3" text:outline-level="3">2.4. Release</text:h>
      <text:p text:style-name="P14"><text:span text:style-name="T4">La entrega final es troba a l'apartat de "Releases" de GitHub amb l'etiqueta </text:span><text:span text:style-name="Source_20_Text"><text:span text:style-name="T4">v1.0.0-final</text:span></text:span><text:span text:style-name="T4">.</text:span></text:p>
      <text:h text:style-name="P11" text:outline-level="2">3. PLANIFICACIÓ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15"><text:span text:style-name="Strong_20_Emphasis"><text:span text:style-name="T4">Mòdul</text:span></text:span></text:p>
            </table:table-cell>
            <table:table-cell table:style-name="Tabla1.A1" office:value-type="string">
              <text:p text:style-name="P15"><text:span text:style-name="Strong_20_Emphasis"><text:span text:style-name="T4">Tasca</text:span></text:span></text:p>
            </table:table-cell>
            <table:table-cell table:style-name="Tabla1.A1" office:value-type="string">
              <text:p text:style-name="P15"><text:span text:style-name="Strong_20_Emphasis"><text:span text:style-name="T4">T. Estimat</text:span></text:span></text:p>
            </table:table-cell>
            <table:table-cell table:style-name="Tabla1.A1" office:value-type="string">
              <text:p text:style-name="P15"><text:span text:style-name="Strong_20_Emphasis"><text:span text:style-name="T4">T. Real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6">M05</text:p>
          </table:table-cell>
          <table:table-cell table:style-name="Tabla1.A1" office:value-type="string">
            <text:p text:style-name="P17">Crear repositori i branques a GitHub</text:p>
          </table:table-cell>
          <table:table-cell table:style-name="Tabla1.A1" office:value-type="string">
            <text:p text:style-name="P17">1h</text:p>
          </table:table-cell>
          <table:table-cell table:style-name="Tabla1.A1" office:value-type="string">
            <text:p text:style-name="P17">1h</text:p>
          </table:table-cell>
        </table:table-row>
        <table:table-row>
          <table:table-cell table:style-name="Tabla1.A1" office:value-type="string">
            <text:p text:style-name="P16">M05</text:p>
          </table:table-cell>
          <table:table-cell table:style-name="Tabla1.A1" office:value-type="string">
            <text:p text:style-name="P17">Crear diagrama de classes (UML)</text:p>
          </table:table-cell>
          <table:table-cell table:style-name="Tabla1.A1" office:value-type="string">
            <text:p text:style-name="P17">3h</text:p>
          </table:table-cell>
          <table:table-cell table:style-name="Tabla1.A1" office:value-type="string">
            <text:p text:style-name="P17">2h</text:p>
          </table:table-cell>
        </table:table-row>
        <table:table-row>
          <table:table-cell table:style-name="Tabla1.A1" office:value-type="string">
            <text:p text:style-name="P16">M01</text:p>
          </table:table-cell>
          <table:table-cell table:style-name="Tabla1.A1" office:value-type="string">
            <text:p text:style-name="P17">Realitzar documentació i manual d'usuari</text:p>
          </table:table-cell>
          <table:table-cell table:style-name="Tabla1.A1" office:value-type="string">
            <text:p text:style-name="P17">4h</text:p>
          </table:table-cell>
          <table:table-cell table:style-name="Tabla1.A1" office:value-type="string">
            <text:p text:style-name="P17">5h</text:p>
          </table:table-cell>
        </table:table-row>
        <table:table-row>
          <table:table-cell table:style-name="Tabla1.A1" office:value-type="string">
            <text:p text:style-name="P16">M02</text:p>
          </table:table-cell>
          <table:table-cell table:style-name="Tabla1.A1" office:value-type="string">
            <text:p text:style-name="P17">Instal·lar i configurar Oracle DB</text:p>
          </table:table-cell>
          <table:table-cell table:style-name="Tabla1.A1" office:value-type="string">
            <text:p text:style-name="P17">2h</text:p>
          </table:table-cell>
          <table:table-cell table:style-name="Tabla1.A1" office:value-type="string">
            <text:p text:style-name="P17">3h</text:p>
          </table:table-cell>
        </table:table-row>
        <table:table-row>
          <table:table-cell table:style-name="Tabla1.A1" office:value-type="string">
            <text:p text:style-name="P16">M02</text:p>
          </table:table-cell>
          <table:table-cell table:style-name="Tabla1.A1" office:value-type="string">
            <text:p text:style-name="P17">Crear scripts SQL i execució</text:p>
          </table:table-cell>
          <table:table-cell table:style-name="Tabla1.A1" office:value-type="string">
            <text:p text:style-name="P17">3h</text:p>
          </table:table-cell>
          <table:table-cell table:style-name="Tabla1.A1" office:value-type="string">
            <text:p text:style-name="P17">3h</text:p>
          </table:table-cell>
        </table:table-row>
        <table:table-row>
          <table:table-cell table:style-name="Tabla1.A1" office:value-type="string">
            <text:p text:style-name="P16">M03</text:p>
          </table:table-cell>
          <table:table-cell table:style-name="Tabla1.A1" office:value-type="string">
            <text:p text:style-name="P18"><text:span text:style-name="T4">Programar lògica de </text:span><text:span text:style-name="Source_20_Text"><text:span text:style-name="T4">Civilization</text:span></text:span><text:span text:style-name="T4"> i </text:span><text:span text:style-name="Source_20_Text"><text:span text:style-name="T4">Unit</text:span></text:span></text:p>
          </table:table-cell>
          <table:table-cell table:style-name="Tabla1.A1" office:value-type="string">
            <text:p text:style-name="P17">10h</text:p>
          </table:table-cell>
          <table:table-cell table:style-name="Tabla1.A1" office:value-type="string">
            <text:p text:style-name="P17">12h</text:p>
          </table:table-cell>
        </table:table-row>
        <table:table-row>
          <table:table-cell table:style-name="Tabla1.A1" office:value-type="string">
            <text:p text:style-name="P16">M03</text:p>
          </table:table-cell>
          <table:table-cell table:style-name="Tabla1.A1" office:value-type="string">
            <text:p text:style-name="P18"><text:span text:style-name="T4">Programar lògica de batalla i </text:span><text:span text:style-name="Source_20_Text"><text:span text:style-name="T4">Main</text:span></text:span></text:p>
          </table:table-cell>
          <table:table-cell table:style-name="Tabla1.A1" office:value-type="string">
            <text:p text:style-name="P17">6h</text:p>
          </table:table-cell>
          <table:table-cell table:style-name="Tabla1.A1" office:value-type="string">
            <text:p text:style-name="P17">8h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9T15:54:35.161632829</meta:creation-date>
    <dc:date>2026-05-09T20:16:30.539443812</dc:date>
    <meta:editing-duration>PT1H12M50S</meta:editing-duration>
    <meta:editing-cycles>2</meta:editing-cycles>
    <meta:generator>LibreOffice/25.8.6.2$Linux_X86_64 LibreOffice_project/a46b460d1686bb49c718d2ef5f88b83ff2dc4981</meta:generator>
    <meta:document-statistic meta:table-count="1" meta:image-count="1" meta:object-count="0" meta:page-count="4" meta:paragraph-count="67" meta:word-count="363" meta:character-count="2307" meta:non-whitespace-character-count="2026"/>
  </office:meta>
</office:document-meta>
</file>